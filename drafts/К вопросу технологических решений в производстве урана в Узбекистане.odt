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Google Sans" svg:font-family="'Google Sans', sans-serif"/>
    <style:font-face style:name="Inter" svg:font-family="Inter, system-ui, apple-system, 'Segoe UI'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.318cm" fo:margin-bottom="0.423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4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P5" style:family="paragraph" style:parent-style-name="Text_20_body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P6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7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9" style:family="paragraph" style:parent-style-name="Standard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4pt" style:text-underline-style="none" fo:font-weight="bold" style:text-blinking="false" style:font-size-asian="14pt" style:font-size-complex="14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c9211e" loext:opacity="100%" style:text-line-through-style="none" style:text-line-through-type="none" style:font-name="Inter" fo:font-size="15.75pt" fo:letter-spacing="normal" fo:font-style="normal" style:text-underline-style="none" fo:font-weight="normal" officeooo:paragraph-rsid="000fd099" style:text-blinking="false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83d3c" loext:opacity="100%" style:text-line-through-style="none" style:text-line-through-type="none" style:font-name="Liberation Serif" fo:font-size="14pt" fo:letter-spacing="normal" fo:font-style="normal" style:text-underline-style="none" fo:font-weight="bold" officeooo:paragraph-rsid="000fd099" style:text-blinking="false" style:font-size-asian="14pt" style:font-weight-asian="bold" style:font-size-complex="14pt" style:font-weight-complex="bold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0fd099"/>
    </style:style>
    <style:style style:name="P13" style:family="paragraph" style:parent-style-name="Text_20_body">
      <style:paragraph-properties fo:margin-left="0cm" fo:margin-right="0cm" fo:margin-top="0.635cm" fo:margin-bottom="0.318cm" style:contextual-spacing="false" fo:text-indent="0cm" style:auto-text-indent="false"/>
      <style:text-properties style:text-line-through-style="none" style:text-line-through-type="none" style:font-name="Google Sans" fo:font-size="15pt" style:text-underline-style="none" fo:font-weight="bold" style:text-blinking="false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133747"/>
    </style:style>
    <style:style style:name="T1" style:family="text">
      <style:text-properties style:text-line-through-style="none" style:text-line-through-type="none" style:font-name="Google Sans" fo:font-size="12pt" style:text-underline-style="none" fo:font-weight="bold" style:text-blinking="false" loext:padding="0cm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bold" officeooo:rsid="0011c060" style:text-blinking="false" loext:padding="0cm" loext:border="none"/>
    </style:style>
    <style:style style:name="T3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4" style:family="text">
      <style:text-properties style:text-line-through-style="none" style:text-line-through-type="none" style:font-name="Google Sans" fo:font-size="12pt" style:text-underline-style="none" fo:font-weight="normal" officeooo:rsid="0011c060" style:text-blinking="false" loext:padding="0cm" loext:border="none"/>
    </style:style>
    <style:style style:name="T5" style:family="text">
      <style:text-properties style:text-line-through-style="none" style:text-line-through-type="none" style:font-name="Google Sans" fo:font-size="12pt" style:text-underline-style="none" fo:font-weight="normal" officeooo:rsid="00133747" style:text-blinking="false" loext:padding="0cm" loext:border="none"/>
    </style:style>
    <style:style style:name="T6" style:family="text">
      <style:text-properties officeooo:rsid="000d4a12"/>
    </style:style>
    <style:style style:name="T7" style:family="text">
      <style:text-properties fo:font-variant="normal" fo:text-transform="none" fo:color="#383d3c" loext:opacity="100%" style:text-line-through-style="none" style:text-line-through-type="none" style:font-name="Liberation Serif" fo:font-size="16pt" fo:letter-spacing="normal" fo:font-style="normal" style:text-underline-style="none" fo:font-weight="bold" style:text-blinking="false" style:font-size-asian="16pt" style:font-weight-asian="bold" style:font-size-complex="16pt" style:font-weight-complex="bold" loext:padding="0cm" loext:border="none"/>
    </style:style>
    <style:style style:name="T8" style:family="text">
      <style:text-properties fo:font-variant="normal" fo:text-transform="none" fo:color="#383d3c" loext:opacity="100%" style:text-line-through-style="none" style:text-line-through-type="none" style:font-name="Liberation Serif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9" style:family="text">
      <style:text-properties fo:font-variant="normal" fo:text-transform="none" fo:color="#383d3c" loext:opacity="100%" style:text-line-through-style="none" style:text-line-through-type="none" style:font-name="Liberation Serif" fo:font-size="14pt" fo:letter-spacing="normal" fo:font-style="normal" style:text-underline-style="none" fo:font-weight="bold" style:text-blinking="false" style:font-size-asian="14pt" style:font-weight-asian="bold" style:font-size-complex="14pt" style:font-weight-complex="bold" loext:padding="0cm" loext:border="none"/>
    </style:style>
    <style:style style:name="T10" style:family="text">
      <style:text-properties fo:color="#383d3c" loext:opacity="100%" style:text-line-through-style="none" style:text-line-through-type="none" style:font-name="Liberation Serif" fo:font-size="16pt" style:text-underline-style="none" fo:font-weight="bold" style:text-blinking="false" style:font-size-asian="16pt" style:font-weight-asian="bold" style:font-size-complex="16pt" style:font-weight-complex="bold" loext:padding="0cm" loext:border="none"/>
    </style:style>
    <style:style style:name="T11" style:family="text">
      <style:text-properties fo:color="#383d3c" loext:opacity="100%" style:text-line-through-style="none" style:text-line-through-type="none" style:font-name="Liberation Serif" style:text-underline-style="none" fo:font-weight="bold" style:text-blinking="false" style:font-weight-asian="bold" style:font-weight-complex="bold" loext:padding="0cm" loext:border="none"/>
    </style:style>
    <style:style style:name="T12" style:family="text">
      <style:text-properties fo:color="#383d3c" loext:opacity="100%" style:text-line-through-style="none" style:text-line-through-type="none" style:font-name="Liberation Serif" fo:font-size="14pt" style:text-underline-style="none" fo:font-weight="bold" style:text-blinking="false" style:font-size-asian="14pt" style:font-weight-asian="bold" style:font-size-complex="14pt" style:font-weight-complex="bold" loext:padding="0cm" loext:border="none"/>
    </style:style>
    <style:style style:name="T13" style:family="text">
      <style:text-properties fo:color="#383d3c" loext:opacity="100%" style:font-name="Liberation Serif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383d3c" loext:opacity="100%" style:font-name="Liberation Serif" fo:font-size="16pt" fo:font-weight="bold" officeooo:rsid="000fd099" style:font-size-asian="16pt" style:font-weight-asian="bold" style:font-size-complex="16pt" style:font-weight-complex="bold"/>
    </style:style>
    <style:style style:name="T15" style:family="text">
      <style:text-properties fo:color="#383d3c" loext:opacity="100%" style:font-name="Liberation Serif" fo:font-size="16pt" fo:font-weight="bold" officeooo:rsid="0011c060" style:font-size-asian="16pt" style:font-weight-asian="bold" style:font-size-complex="16pt" style:font-weight-complex="bold"/>
    </style:style>
    <style:style style:name="T16" style:family="text">
      <style:text-properties fo:color="#383d3c" loext:opacity="100%" style:font-name="Liberation Serif" fo:font-weight="bold" style:font-weight-asian="bold" style:font-weight-complex="bold"/>
    </style:style>
    <style:style style:name="T17" style:family="text">
      <style:text-properties fo:color="#383d3c" loext:opacity="100%" style:font-name="Liberation Serif" fo:font-weight="bold" officeooo:rsid="0011c060" style:font-weight-asian="bold" style:font-weight-complex="bold"/>
    </style:style>
    <style:style style:name="T18" style:family="text">
      <style:text-properties fo:color="#383d3c" loext:opacity="100%" style:font-name="Liberation Serif" fo:font-weight="bold" officeooo:rsid="000fd099" style:font-weight-asian="bold" style:font-weight-complex="bold"/>
    </style:style>
    <style:style style:name="T19" style:family="text">
      <style:text-properties fo:color="#383d3c" loext:opacity="100%" style:font-name="Liberation Serif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383d3c" loext:opacity="100%" style:font-name="Liberation Serif" fo:font-size="14pt" fo:font-weight="bold" officeooo:rsid="0011c060" style:font-size-asian="14pt" style:font-weight-asian="bold" style:font-size-complex="14pt" style:font-weight-complex="bold"/>
    </style:style>
    <style:style style:name="T21" style:family="text">
      <style:text-properties fo:color="#383d3c" loext:opacity="100%" style:font-name="Liberation Serif" fo:font-size="14pt" fo:font-weight="bold" officeooo:rsid="000fd099" style:font-size-asian="14pt" style:font-weight-asian="bold" style:font-size-complex="14pt" style:font-weight-complex="bold"/>
    </style:style>
    <style:style style:name="T22" style:family="text">
      <style:text-properties officeooo:rsid="0011c060"/>
    </style:style>
    <style:style style:name="T23" style:family="text">
      <style:text-properties officeooo:rsid="00133747"/>
    </style:style>
    <style:style style:name="T24" style:family="text">
      <style:text-properties officeooo:rsid="001508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3">К вопросу технологических решений в производстве урана</text:span> в Узбекистане.</text:p>
      <text:p text:style-name="P1"><text:span text:style-name="Strong_20_Emphasis"><text:span text:style-name="T1">Автор:</text:span></text:span><text:span text:style-name="T3"> Рустамжон <text:s/>Усманов, ведущий специалист, изобретатель</text:span></text:p>
      <text:p text:style-name="P6">Введение</text:p>
      <text:p text:style-name="P8"><text:span text:style-name="T3"/></text:p>
      <text:p text:style-name="P12"><text:span text:style-name="T9">По состоянию на 2026 год урановая промышленность Узбекистана декларирует амбициозные планы — в</text:span><text:span text:style-name="T19"> рамках государственной стратегии планируется довести ежегодную добычу урана до </text:span><text:span text:style-name="Strong_20_Emphasis"><text:span text:style-name="T12">7 200 тонн к 2030 году</text:span></text:span></text:p>
      <text:p text:style-name="P11"/>
      <text:p text:style-name="P10"><text:span text:style-name="T19">Суммарные запасы урана в недрах Узбекистана официально оцениваются в </text:span><text:span text:style-name="Strong_20_Emphasis"><text:span text:style-name="T19">139 000 тонн</text:span></text:span><text:span text:style-name="T19">. Однако практикующие геологи и инженеры, исследования которых проводились в Центральных Кызылкумах, знают скрытую изнанку этих цифр. Реальная отработка ключевых эксплуатируемых месторождений достигла более </text:span><text:span text:style-name="T20">4</text:span><text:span text:style-name="T21">0</text:span><text:span text:style-name="T19">%, а данные государственной геологической службы по запасам категории С1 исторически расходились с жесткой эксплуатационной разведкой рудоуправлений вплоть до </text:span><text:span text:style-name="T21">2</text:span><text:span text:style-name="T19">0%.</text:span></text:p>
      <text:p text:style-name="P9"><text:s/><text:span text:style-name="T23">Проблемы</text:span> современной урановой индустрии.</text:p>
      <text:p text:style-name="P4">1. <text:s/>Кольматация и истощение пластов</text:p>
      <text:p text:style-name="P1"><text:span text:style-name="T3">При отработке пластов, остаточный уран </text:span><text:span text:style-name="T5">в основном </text:span><text:span text:style-name="T3">заперт в слабопроницаемых, глинистых или высококарбонатных зонах. Экстенсивный метод — закачка сверхнормативных объемов серной кислоты, <text:s/>приводит к <text:s/></text:span><text:span text:style-name="T5">экологической </text:span><text:span text:style-name="T3">катастрофе </text:span><text:span text:style-name="T5">подземных вод</text:span><text:span text:style-name="T3">. Кислота вступает в реакцию со вмещающим кальцитом, образуя гипс. Пласт намертво «слепнет» (кольматируется), приемистость скважин падает до нуля, а концентрация урана в продуктивных растворах снижается до критического минимума. Метод подземного скважинного выщелачивания (ПВ) с применением безрассудного нагнетания серной кислоты, при котором должным образом <text:s/>не используются барражные скважины, навсегда уничтожает стратегический резерв Центральных Кызылкумов — подземные водоносные горизонты, рекультивация которой потребует сотен миллионов долларов.</text:span></text:p>
      <text:p text:style-name="P13">2. <text:span text:style-name="T22">Т</text:span>ехнологичные решения.</text:p>
      <text:p text:style-name="P5">Решение №1. <text:span text:style-name="T23">Способ подземного выщелачивания урана (Патент № IAP 05336, </text:span><text:span text:style-name="T24">копия </text:span><text:span text:style-name="T23">патент</text:span><text:span text:style-name="T24">а</text:span><text:span text:style-name="T23"> </text:span><text:span text:style-name="T24">с описанием вложены рядом</text:span>)</text:p>
      <text:p text:style-name="P3"><text:soft-page-break/>Фундаментальная основа химии урана — перевод инертной, нерастворимой четырехвалентной формы (U⁴⁺) в подвижную шестивалентную (U⁶⁺).</text:p>
      <text:p text:style-name="P16"><text:span text:style-name="T3">Вместо закупки чистой кислоты, глубоких пластах месторождени</text:span><text:span text:style-name="T5">й</text:span><text:span text:style-name="T3"> </text:span><text:span text:style-name="Strong_20_Emphasis"><text:span text:style-name="T1">Северного рудоуправления (СевРУ)</text:span></text:span><text:span text:style-name="T3"> <text:s/>была внедрена и испытана гениальная синергия уранового и золотого производств. Технология использовала жидкие сульфидные отходы комплекса биоокисления золотых руд ГМЗ-3 (Кокпатас).</text:span></text:p>
      <text:list text:style-name="L1">
        <text:list-item>
          <text:p text:style-name="P15"><text:span text:style-name="T3">В пласт подавался бесплатный биореагент, содержащий культуру бактерий </text:span><text:span text:style-name="Emphasis"><text:span text:style-name="T3">Acidithiobacillus ferrooxidans</text:span></text:span><text:span text:style-name="T3"> и двухвалентное железо (Fe²⁺).</text:span></text:p>
        </text:list-item>
        <text:list-item>
          <text:p text:style-name="P15"><text:span text:style-name="T3">Параллельно через специализированные узлы нагнетался </text:span><text:span text:style-name="Strong_20_Emphasis"><text:span text:style-name="T1">технический кислород</text:span></text:span><text:span text:style-name="T3"> и сбалансированная </text:span><text:span text:style-name="Strong_20_Emphasis"><text:span text:style-name="T1">питательная среда</text:span></text:span><text:span text:style-name="T3"> для поддержания живучести бактерий в анаэробных условиях недр.</text:span></text:p>
        </text:list-item>
        <text:list-item>
          <text:p text:style-name="P14">Бактерии непрерывно регенерировали железо в трехвалентную форму (Fe³⁺), которая выступала мощнейшим идеальным окислителем, переводящим U⁴⁺ → U⁶⁺ без закисления пласта.</text:p>
        </text:list-item>
        <text:list-item>
          <text:p text:style-name="P15"><text:span text:style-name="Strong_20_Emphasis"><text:span text:style-name="T1">Результат:</text:span></text:span><text:span text:style-name="T3"> Стабильная проницаемость недр и колоссальный съем — </text:span><text:span text:style-name="Strong_20_Emphasis"><text:span text:style-name="T1">более 80 тонн закиси-окиси урана всего с одного технологического </text:span></text:span><text:span text:style-name="Strong_20_Emphasis"><text:span text:style-name="T2">участка</text:span></text:span><text:span text:style-name="T3">.</text:span></text:p>
        </text:list-item>
      </text:list>
      <text:p text:style-name="P5">Решение №2. Бескислотная добыча технической водой (Опыт Кетменчи)</text:p>
      <text:p text:style-name="P2"><text:span text:style-name="T3">Еще 30 лет назад, в середине 1990-х годов, в условиях экономического хаоса, на месторождении </text:span><text:span text:style-name="Strong_20_Emphasis"><text:span text:style-name="T1">Кетменчи</text:span></text:span><text:span text:style-name="T3"> был доказан геохимический факт: уран там изначально находится в естественной шестивалентной форме (U⁶⁺) благодаря вековой природной инфильтрации кислородных вод.</text:span></text:p>
      <text:p text:style-name="P2"><text:span text:style-name="T3">Авторами метода была внедрена добыча </text:span><text:span text:style-name="Strong_20_Emphasis"><text:span text:style-name="T1">простой технической водой с растворенными газами</text:span></text:span><text:span text:style-name="T3">, без единой капли серной кислоты. Вода мягко вымывала готовый уранил-ион, обеспечивая практически нулевую себестоимость по реагентам и абсолютную экологическую чисто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Google Sans" svg:font-family="'Google Sans', sans-serif"/>
    <style:font-face style:name="Inter" svg:font-family="Inter, system-ui, apple-system, 'Segoe UI'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4T09:13:02.916091415</meta:creation-date>
    <meta:generator>LibreOffice/24.2.7.2$Linux_X86_64 LibreOffice_project/420$Build-2</meta:generator>
    <dc:date>2026-07-24T12:16:20.286814484</dc:date>
    <meta:editing-duration>PT6M56S</meta:editing-duration>
    <meta:editing-cycles>2</meta:editing-cycles>
    <meta:document-statistic meta:table-count="0" meta:image-count="0" meta:object-count="0" meta:page-count="2" meta:paragraph-count="19" meta:word-count="421" meta:character-count="3387" meta:non-whitespace-character-count="2991"/>
  </office:meta>
</office:document-meta>
</file>