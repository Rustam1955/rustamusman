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oogle Sans" svg:font-family="'Google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Standard">
      <style:paragraph-properties fo:margin-left="0cm" fo:margin-right="0cm" fo:margin-top="0.635cm" fo:margin-bottom="0.318cm" style:contextual-spacing="false" fo:text-indent="0cm" style:auto-text-indent="false"/>
    </style:style>
    <style:style style:name="P3" style:family="paragraph" style:parent-style-name="Standard">
      <style:paragraph-properties fo:margin-left="0cm" fo:margin-right="0cm" fo:margin-top="0.318cm" fo:margin-bottom="0.423cm" style:contextual-spacing="false" fo:text-indent="0cm" style:auto-text-indent="false"/>
      <style:text-properties style:text-line-through-style="none" style:text-line-through-type="none" style:font-name="Google Sans" fo:font-size="12pt" style:text-underline-style="none" fo:font-weight="normal" style:text-blinking="false" loext:padding="0cm" loext:border="none"/>
    </style:style>
    <style:style style:name="P4" style:family="paragraph" style:parent-style-name="Standard">
      <style:paragraph-properties fo:margin-left="0cm" fo:margin-right="0cm" fo:margin-top="0.635cm" fo:margin-bottom="0.318cm" style:contextual-spacing="false" fo:text-indent="0cm" style:auto-text-indent="false"/>
      <style:text-properties style:text-line-through-style="none" style:text-line-through-type="none" style:font-name="Google Sans" fo:font-size="12pt" style:text-underline-style="none" fo:font-weight="bold" style:text-blinking="false" loext:padding="0cm" loext:border="none"/>
    </style:style>
    <style:style style:name="P5" style:family="paragraph" style:parent-style-name="Standard">
      <style:paragraph-properties fo:margin-left="0cm" fo:margin-right="0cm" fo:margin-top="0.635cm" fo:margin-bottom="0.318cm" style:contextual-spacing="false" fo:text-indent="0cm" style:auto-text-indent="false"/>
      <style:text-properties style:text-line-through-style="none" style:text-line-through-type="none" style:font-name="Google Sans" fo:font-size="15pt" style:text-underline-style="none" fo:font-weight="bold" style:text-blinking="false" loext:padding="0cm" loext:border="none"/>
    </style:style>
    <style:style style:name="P6" style:family="paragraph" style:parent-style-name="Standard">
      <style:paragraph-properties fo:margin-left="0cm" fo:margin-right="0cm" fo:margin-top="0.318cm" fo:margin-bottom="0.423cm" style:contextual-spacing="false" fo:text-indent="0cm" style:auto-text-indent="false"/>
      <style:text-properties officeooo:paragraph-rsid="000d4a12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margin-top="0.318cm" fo:margin-bottom="0.423cm" style:contextual-spacing="false" fo:text-indent="0cm" style:auto-text-indent="false"/>
      <style:text-properties style:text-line-through-style="none" style:text-line-through-type="none" style:font-name="Google Sans" fo:font-size="12pt" style:text-underline-style="none" fo:font-weight="normal" style:text-blinking="false" loext:padding="0cm" loext:border="none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style:text-line-through-style="none" style:text-line-through-type="none" style:font-name="Google Sans" fo:font-size="12pt" style:text-underline-style="none" fo:font-weight="normal" style:text-blinking="false" loext:padding="0cm" loext:border="none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style:text-line-through-style="none" style:text-line-through-type="none" style:font-name="Google Sans" fo:font-size="12pt" style:text-underline-style="none" fo:font-weight="normal" style:text-blinking="false" loext:padding="0cm" loext:border="none"/>
    </style:style>
    <style:style style:name="P11" style:family="paragraph" style:parent-style-name="Text_20_body">
      <style:paragraph-properties fo:margin-left="0cm" fo:margin-right="0cm" fo:margin-top="0.635cm" fo:margin-bottom="0.318cm" style:contextual-spacing="false" fo:text-indent="0cm" style:auto-text-indent="false"/>
      <style:text-properties style:text-line-through-style="none" style:text-line-through-type="none" style:font-name="Google Sans" fo:font-size="12pt" style:text-underline-style="none" fo:font-weight="bold" style:text-blinking="false" loext:padding="0cm" loext:border="none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Text_20_body">
      <style:paragraph-properties fo:margin-left="0cm" fo:margin-right="0cm" fo:margin-top="0.635cm" fo:margin-bottom="0.318cm" style:contextual-spacing="false" fo:text-indent="0cm" style:auto-text-indent="false"/>
    </style:style>
    <style:style style:name="P15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6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T1" style:family="text">
      <style:text-properties style:text-line-through-style="none" style:text-line-through-type="none" style:font-name="Google Sans" fo:font-size="12pt" style:text-underline-style="none" fo:font-weight="bold" style:text-blinking="false" loext:padding="0cm" loext:border="none"/>
    </style:style>
    <style:style style:name="T2" style:family="text">
      <style:text-properties style:text-line-through-style="none" style:text-line-through-type="none" style:font-name="Google Sans" fo:font-size="12pt" style:text-underline-style="none" fo:font-weight="normal" style:text-blinking="false" loext:padding="0cm" loext:border="none"/>
    </style:style>
    <style:style style:name="T3" style:family="text">
      <style:text-properties style:text-line-through-style="none" style:text-line-through-type="none" style:font-name="Google Sans" fo:font-size="12pt" style:text-underline-style="none" fo:font-weight="normal" officeooo:rsid="000cb0c9" style:text-blinking="false" loext:padding="0cm" loext:border="none"/>
    </style:style>
    <style:style style:name="T4" style:family="text">
      <style:text-properties style:text-line-through-style="none" style:text-line-through-type="none" style:font-name="Google Sans" fo:font-size="15pt" style:text-underline-style="none" fo:font-weight="bold" style:text-blinking="false" loext:padding="0cm" loext:border="none"/>
    </style:style>
    <style:style style:name="T5" style:family="text">
      <style:text-properties officeooo:rsid="000d4a1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Кризис сырьевой базы урана в Узбекистане: тупик «экстенсивной химии» и высокотехнологичные решения будущего</text:span></text:p>
      <text:p text:style-name="P1"><text:span text:style-name="Strong_20_Emphasis"><text:span text:style-name="T1">Автор:</text:span></text:span><text:span text:style-name="T2"> Рустамжон <text:s/>Усманов, ведущий специалист, изобретатель</text:span></text:p>
      <text:p text:style-name="P5">Введение</text:p>
      <text:p text:style-name="P1"><text:span text:style-name="T2">По состоянию на 2026 год урановая промышленность Узбекистана декларирует амбициозные планы — форсировать объемы добычи природного урана до </text:span><text:span text:style-name="Strong_20_Emphasis"><text:span text:style-name="T1">10 000 тонн в год</text:span></text:span><text:span text:style-name="T2">, опираясь на бумажный прирост запасов по международным стандартам JORC (до 96,6 тыс. тонн). Однако практикующие геологи и инженеры, исследования которых проводились в Центральных Кызылкумах, знают скрытую изнанку этих цифр. Реальная отработка ключевых эксплуатируемых месторождений достигла </text:span><text:span text:style-name="Strong_20_Emphasis"><text:span text:style-name="T1">80%</text:span></text:span><text:span text:style-name="T2">, а данные государственной геологической службы по запасам категории С1 исторически расходились с жесткой эксплуатационной разведкой рудоуправлений вплоть до 50%.</text:span></text:p>
      <text:p text:style-name="P3">Отрасль оказалась перед системным вызовом: попытка закрыть кадровый голод «эффективными менеджерами» и раздутыми министерскими штатами (включая агентство «Узатом») привела к слепому копированию устаревших методов. Погоня за валом выливается в варварское, бесконтрольное закисление недр тоннами серной кислоты. Это ведет к технологическому и экологическому тупику.</text:p>
      <text:p text:style-name="P2"><text:span text:style-name="T4">ЧАСТЬ 1. Главные беды современной урановой индустрии</text:span></text:p>
      <text:p text:style-name="P4">1. Технологический тупик: Кольматация и истощение пластов</text:p>
      <text:p text:style-name="P1"><text:span text:style-name="T2">При отработке пластов на 80% остаточный уран заперт в слабопроницаемых, глинистых или высококарбонатных зонах. Экстенсивный метод — закачка сверхнормативных объемов серной кислоты — на таких объектах, как </text:span><text:span text:style-name="Strong_20_Emphasis"><text:span text:style-name="T1">Северный Канимех</text:span></text:span><text:span text:style-name="T2">, приводит к мгновенной химической катастрофе. Кислота вступает в реакцию со вмещающим кальцитом, образуя гипс. Пласт намертво «слепнет» (кольматируется), приемистость скважин падает до нуля, а концентрация урана в продуктивных растворах снижается до критического минимума. Рудники гоняют по трубам миллионы кубометров пустой слабокислой жижи, уничтожая оборудование и колоссально завышая себестоимость.</text:span></text:p>
      <text:p text:style-name="P1"><text:span text:style-name="T2"/></text:p>
      <text:p text:style-name="P1"><text:span text:style-name="T2"/></text:p>
      <text:p text:style-name="P4"><text:soft-page-break/>2. Экологическая мина замедленного действия</text:p>
      <text:p text:style-name="P6"><text:span text:style-name="T2">Метод подземного скважинного выщелачивания (ПВ) с применением безрассудного нагнетания серной кислоты, при котором игнорируются и не используются барражные скважины, навсегда уничтожает стратегический резерв Центральных Кызылкумов — подземные водоносные горизонты</text:span></text:p>
      <text:p text:style-name="P6"><text:span text:style-name="T2">Тонны растворов мигрируют по пластам, насыщая воду тяжелыми металлами и остаточной радиацией. Финансирование уходит на содержание раздутых штатов чиновников, в то время как будущим поколениям оставляется отравленная пустыня, рекультивация которой потребует сотен миллионов долларов.</text:span></text:p>
      <text:p text:style-name="P14"><text:span text:style-name="T4">ЧАСТЬ 2. Высокотехнологичные решения: Опыт, опередивший время</text:span></text:p>
      <text:p text:style-name="P8">Выход из сырьевого и экологического кризиса лежит не в кабинетах Ташкента, а в возвращении к фундаментальным научным разработкам школы практиков НГМК 15–30-летней давности. Под каждое специфическое месторождение авторами был разработан свой индивидуальный рецепт, защищенный официальными патентами на изобретения.</text:p>
      <text:p text:style-name="P11">Решение №1. Кислородно-бактериальный комплекс (Опыт СевРУ, <text:span text:style-name="T5">Северный Кенимех.</text:span> Сугралы)</text:p>
      <text:p text:style-name="P8">Фундаментальная основа химии урана — перевод инертной, нерастворимой четырехвалентной формы (U⁴⁺) в подвижную шестивалентную (U⁶⁺).</text:p>
      <text:p text:style-name="P12"><text:span text:style-name="T2">Вместо закупки чистой кислоты, на участках </text:span><text:span text:style-name="Strong_20_Emphasis"><text:span text:style-name="T1">Северного рудоуправления (СевРУ)</text:span></text:span><text:span text:style-name="T2"> и глубоких пластах месторождения </text:span><text:span text:style-name="Strong_20_Emphasis"><text:span text:style-name="T1">Сугралы</text:span></text:span><text:span text:style-name="T2"> была внедрена и испытана гениальная синергия уранового и золотого производств. Технология использовала жидкие сульфидные отходы комплекса биоокисления золотых руд ГМЗ-3 (Кокпатас).</text:span></text:p>
      <text:list text:style-name="L2">
        <text:list-item>
          <text:p text:style-name="P15"><text:span text:style-name="T2">В пласт подавался бесплатный биореагент, содержащий культуру бактерий </text:span><text:span text:style-name="Emphasis"><text:span text:style-name="T2">Acidithiobacillus ferrooxidans</text:span></text:span><text:span text:style-name="T2"> и двухвалентное железо (Fe²⁺).</text:span></text:p>
        </text:list-item>
        <text:list-item>
          <text:p text:style-name="P15"><text:span text:style-name="T2">Параллельно через специализированные узлы нагнетался </text:span><text:span text:style-name="Strong_20_Emphasis"><text:span text:style-name="T1">технический кислород</text:span></text:span><text:span text:style-name="T2"> и сбалансированная </text:span><text:span text:style-name="Strong_20_Emphasis"><text:span text:style-name="T1">питательная среда</text:span></text:span><text:span text:style-name="T2"> для поддержания живучести бактерий в анаэробных условиях недр.</text:span></text:p>
        </text:list-item>
        <text:list-item>
          <text:p text:style-name="P9"><text:soft-page-break/>Бактерии непрерывно регенерировали железо в трехвалентную форму (Fe³⁺), которая выступала мощнейшим идеальным окислителем, переводящим U⁴⁺ → U⁶⁺ без закисления пласта.</text:p>
        </text:list-item>
        <text:list-item>
          <text:p text:style-name="P15"><text:span text:style-name="Strong_20_Emphasis"><text:span text:style-name="T1">Результат:</text:span></text:span><text:span text:style-name="T2"> Стабильная проницаемость недр и колоссальный съем — </text:span><text:span text:style-name="Strong_20_Emphasis"><text:span text:style-name="T1">более 80 тонн закиси-окиси урана всего с одного технологического блока</text:span></text:span><text:span text:style-name="T2">.</text:span></text:p>
        </text:list-item>
      </text:list>
      <text:p text:style-name="P11">Решение №2. Бескислотная добыча технической водой (Опыт Кетменчи)</text:p>
      <text:p text:style-name="P13"><text:span text:style-name="T2">Еще 30 лет назад, в середине 1990-х годов, в условиях экономического хаоса, на месторождении </text:span><text:span text:style-name="Strong_20_Emphasis"><text:span text:style-name="T1">Кетменчи</text:span></text:span><text:span text:style-name="T2"> был доказан геохимический факт: уран там изначально находится в естественной шестивалентной форме (U⁶⁺) благодаря вековой природной инфильтрации кислородных вод.</text:span></text:p>
      <text:p text:style-name="P13"><text:span text:style-name="T2">Авторами метода была внедрена добыча </text:span><text:span text:style-name="Strong_20_Emphasis"><text:span text:style-name="T1">простой технической водой с растворенными газами</text:span></text:span><text:span text:style-name="T2">, без единой капли серной кислоты. Вода мягко вымывала готовый уранил-ион, обеспечивая практически нулевую себестоимость по реагентам и абсолютную экологическую чистоту.</text:span></text:p>
      <text:p text:style-name="P11">Решение №3. Изотопная шихтовка для мирового рынка</text:p>
      <text:p text:style-name="P8">Западные компании (США, Европа) отказывались покупать уран Кетменчи из-за специфических сопутствующих примесей, обусловленных водным методом. Решение было найдено на стыке ядерной физики и коммерческого маркетинга:</text:p>
      <text:list text:style-name="L3">
        <text:list-item>
          <text:p text:style-name="P16"><text:span text:style-name="T2">На месторождении </text:span><text:span text:style-name="Strong_20_Emphasis"><text:span text:style-name="T1">Северный Канимех</text:span></text:span><text:span text:style-name="T2"> была обнаружена уникальная природная аномалия — повышенное содержание делящегося изотопа </text:span><text:span text:style-name="Strong_20_Emphasis"><text:span text:style-name="T1">урана-235 (²³⁵U)</text:span></text:span><text:span text:style-name="T2"> выше мирового стандарта в 0,72%.</text:span></text:p>
        </text:list-item>
        <text:list-item>
          <text:p text:style-name="P16"><text:span text:style-name="T2">Была внедрена принудительная </text:span><text:span text:style-name="Strong_20_Emphasis"><text:span text:style-name="T1">шихтовка (смешивание) растворов</text:span></text:span><text:span text:style-name="T2"> Кетменчи и Северного Канимеха.</text:span></text:p>
        </text:list-item>
        <text:list-item>
          <text:p text:style-name="P10">Высокая доля ²³⁵U из Канимеха выступала изотопным суперконцентратом, который полностью перекрывал любые вопросы западных лабораторий по примесям Кетменчи. На выходе ГМЗ-1 выдавал безупречный экспортный продукт, сэкономив государству сотни миллионов долларов.</text:p>
        </text:list-item>
      </text:list>
      <text:p text:style-name="P1"><text:span text:style-name="T2"/></text:p>
      <text:p text:style-name="P1"><text:span text:style-name="T2"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oogle Sans" svg:font-family="'Google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4T09:13:02.916091415</meta:creation-date>
    <meta:generator>LibreOffice/24.2.7.2$Linux_X86_64 LibreOffice_project/420$Build-2</meta:generator>
    <dc:date>2026-07-24T11:05:17.230174039</dc:date>
    <meta:editing-duration>PT4M11S</meta:editing-duration>
    <meta:editing-cycles>1</meta:editing-cycles>
    <meta:document-statistic meta:table-count="0" meta:image-count="0" meta:object-count="0" meta:page-count="3" meta:paragraph-count="29" meta:word-count="663" meta:character-count="5337" meta:non-whitespace-character-count="4722"/>
  </office:meta>
</office:document-meta>
</file>